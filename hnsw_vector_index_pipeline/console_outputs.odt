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B000001C42062C3B0.png" manifest:media-type="image/png"/>
  <manifest:file-entry manifest:full-path="Pictures/100000010000038B000001FEC1B980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-0.166cm" svg:y="0.152cm" svg:width="17cm" svg:height="9.559cm" draw:z-index="0"><draw:image xlink:href="Pictures/100000010000038B000001FEC1B9808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-0.494cm" svg:y="0.381cm" svg:width="17cm" svg:height="8.472cm" draw:z-index="1"><draw:image xlink:href="Pictures/100000010000038B000001C42062C3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22:53:50.951972600</meta:creation-date>
    <dc:date>2026-07-15T23:01:26.370214800</dc:date>
    <meta:editing-duration>PT7M36S</meta:editing-duration>
    <meta:editing-cycles>2</meta:editing-cycles>
    <meta:generator>LibreOffice/25.8.7.3$Windows_X86_64 LibreOffice_project/30742500f2d3eb4366ac312fa33d3dcabdb3eba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