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100000335EB898CEA.png" manifest:media-type="image/png"/>
  <manifest:file-entry manifest:full-path="Pictures/100000010000059C00000359819C551F.png" manifest:media-type="image/png"/>
  <manifest:file-entry manifest:full-path="Pictures/100000010000059D000003598D4CC69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63e" officeooo:paragraph-rsid="00106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494cm" svg:y="0.122cm" svg:width="17cm" svg:height="10.019cm" draw:z-index="0"><draw:image xlink:href="Pictures/100000010000057100000335EB898C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After debugging and code correction</text:p>
      <text:p text:style-name="P1"/>
      <text:p text:style-name="P1"><draw:frame draw:style-name="fr2" draw:name="Image2" text:anchor-type="char" svg:width="17cm" svg:height="10.146cm" draw:z-index="1"><draw:image xlink:href="Pictures/100000010000059C00000359819C551F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char" svg:x="0.333cm" svg:y="0cm" svg:width="17cm" svg:height="10.139cm" draw:z-index="2"><draw:image xlink:href="Pictures/100000010000059D000003598D4CC698.png" xlink:type="simple" xlink:show="embed" xlink:actuate="onLoad" draw:mime-type="image/png"/></draw:frame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20:13:26.544971800</meta:creation-date>
    <dc:date>2026-07-17T21:09:58.972252700</dc:date>
    <meta:editing-duration>PT56M31S</meta:editing-duration>
    <meta:editing-cycles>4</meta:editing-cycles>
    <meta:generator>LibreOffice/25.8.7.3$Windows_X86_64 LibreOffice_project/30742500f2d3eb4366ac312fa33d3dcabdb3eba5</meta:generator>
    <meta:document-statistic meta:table-count="0" meta:image-count="3" meta:object-count="0" meta:page-count="2" meta:paragraph-count="1" meta:word-count="5" meta:character-count="35" meta:non-whitespace-character-count="31"/>
  </office:meta>
</office:document-meta>
</file>