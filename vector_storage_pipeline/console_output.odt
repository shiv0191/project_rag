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940000019C084A34F0.png" manifest:media-type="image/png"/>
  <manifest:file-entry manifest:full-path="Pictures/10000001000005F20000017498BF2EEF.png" manifest:media-type="image/png"/>
  <manifest:file-entry manifest:full-path="Pictures/10000001000003520000004D0FF555A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17cm" svg:height="5.974cm" draw:z-index="0"><draw:image xlink:href="Pictures/10000001000004940000019C084A34F0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" text:anchor-type="char" svg:width="17cm" svg:height="4.154cm" draw:z-index="1"><draw:image xlink:href="Pictures/10000001000005F20000017498BF2EEF.png" xlink:type="simple" xlink:show="embed" xlink:actuate="onLoad" draw:mime-type="image/png"/></draw:frame></text:p>
      <text:p text:style-name="Standard"/>
      <text:p text:style-name="Standard"><draw:frame draw:style-name="fr1" draw:name="Image3" text:anchor-type="char" svg:width="17cm" svg:height="1.54cm" draw:z-index="2"><draw:image xlink:href="Pictures/10000001000003520000004D0FF555A0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5T23:36:07.309315800</meta:creation-date>
    <dc:date>2026-07-15T23:45:41.331635000</dc:date>
    <meta:editing-duration>PT59S</meta:editing-duration>
    <meta:editing-cycles>3</meta:editing-cycles>
    <meta:generator>LibreOffice/25.8.7.3$Windows_X86_64 LibreOffice_project/30742500f2d3eb4366ac312fa33d3dcabdb3eba5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