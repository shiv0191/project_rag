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940000019C084A34F0.png" manifest:media-type="image/png"/>
  <manifest:file-entry manifest:full-path="Pictures/10000001000005F20000017498BF2EE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5.974cm" draw:z-index="0"><draw:image xlink:href="Pictures/10000001000004940000019C084A34F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17cm" svg:height="4.154cm" draw:z-index="1"><draw:image xlink:href="Pictures/10000001000005F20000017498BF2EEF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23:36:07.309315800</meta:creation-date>
    <dc:date>2026-07-15T23:39:30.890685000</dc:date>
    <meta:editing-duration>PT26S</meta:editing-duration>
    <meta:editing-cycles>2</meta:editing-cycles>
    <meta:generator>LibreOffice/25.8.7.3$Windows_X86_64 LibreOffice_project/30742500f2d3eb4366ac312fa33d3dcabdb3eba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