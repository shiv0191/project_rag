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29000002B73CCC4B42.png" manifest:media-type="image/png"/>
  <manifest:file-entry manifest:full-path="Pictures/100000010000060E000000F1E55FF93E.png" manifest:media-type="image/png"/>
  <manifest:file-entry manifest:full-path="Pictures/100000010000043D00000214F3DFDFF5.png" manifest:media-type="image/png"/>
  <manifest:file-entry manifest:full-path="Pictures/1000000100000735000003B7321FFD01.png" manifest:media-type="image/png"/>
  <manifest:file-entry manifest:full-path="Pictures/1000000100000561000000DF757E82A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2bd" officeooo:paragraph-rsid="0018a2bd"/>
    </style:style>
    <style:style style:name="P2" style:family="paragraph" style:parent-style-name="Standard">
      <style:text-properties officeooo:rsid="0018bb33" officeooo:paragraph-rsid="0018bb33"/>
    </style:style>
    <style:style style:name="P3" style:family="paragraph" style:parent-style-name="Standard">
      <style:text-properties officeooo:rsid="001aa21c" officeooo:paragraph-rsid="001aa21c"/>
    </style:style>
    <style:style style:name="P4" style:family="paragraph" style:parent-style-name="Standard">
      <style:text-properties officeooo:rsid="001af0a6" officeooo:paragraph-rsid="001af0a6"/>
    </style:style>
    <style:style style:name="P5" style:family="paragraph" style:parent-style-name="Standard">
      <style:text-properties officeooo:rsid="001d1b8b" officeooo:paragraph-rsid="001d1b8b"/>
    </style:style>
    <style:style style:name="P6" style:family="paragraph" style:parent-style-name="Standard">
      <style:text-properties officeooo:rsid="001ee160" officeooo:paragraph-rsid="001ee160"/>
    </style:style>
    <style:style style:name="P7" style:family="paragraph" style:parent-style-name="Standard">
      <style:text-properties officeooo:rsid="00202e5e" officeooo:paragraph-rsid="00202e5e"/>
    </style:style>
    <style:style style:name="P8" style:family="paragraph" style:parent-style-name="Text_20_body">
      <style:text-properties officeooo:rsid="00202e5e" officeooo:paragraph-rsid="00202e5e"/>
    </style:style>
    <style:style style:name="P9" style:family="paragraph" style:parent-style-name="Text_20_body" style:list-style-name="L1">
      <style:text-properties officeooo:rsid="00202e5e" officeooo:paragraph-rsid="00202e5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202e5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202e5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202e5e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202e5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02e5e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202e5e"/>
    </style:style>
    <style:style style:name="P16" style:family="paragraph" style:parent-style-name="Text_20_body" style:list-style-name="L7">
      <style:text-properties officeooo:rsid="00202e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12cm" svg:y="3.096cm" svg:width="17cm" svg:height="6.445cm" draw:z-index="0"><draw:image xlink:href="Pictures/1000000100000729000002B73CCC4B42.png" xlink:type="simple" xlink:show="embed" xlink:actuate="onLoad" draw:mime-type="image/png"/></draw:frame></text:p>
      <text:p text:style-name="Standard"/>
      <text:p text:style-name="P1">Embedding generation for first few chunks</text:p>
      <text:p text:style-name="P1"/>
      <text:p text:style-name="P1"/>
      <text:p text:style-name="P1"/>
      <text:p text:style-name="P1"/>
      <text:p text:style-name="P1"/>
      <text:p text:style-name="P2">Then I downloaded the model locally with this command:</text:p>
      <text:p text:style-name="P2">hf download BAAI/bge-base-en-v1.5 --local-dir models\bge-base-en-v1.5</text:p>
      <text:p text:style-name="P2"/>
      <text:p text:style-name="P2"><draw:frame draw:style-name="fr1" draw:name="Image2" text:anchor-type="char" svg:x="0cm" svg:y="0.362cm" svg:width="17cm" svg:height="2.642cm" draw:z-index="1"><draw:image xlink:href="Pictures/100000010000060E000000F1E55FF93E.png" xlink:type="simple" xlink:show="embed" xlink:actuate="onLoad" draw:mime-type="image/png"/></draw:frame></text:p>
      <text:p text:style-name="P2"/>
      <text:p text:style-name="P2"><draw:frame draw:style-name="fr1" draw:name="Image3" text:anchor-type="char" svg:x="-0.328cm" svg:y="1.196cm" svg:width="17cm" svg:height="8.763cm" draw:z-index="2"><draw:image xlink:href="Pictures/1000000100000735000003B7321FFD01.png" xlink:type="simple" xlink:show="embed" xlink:actuate="onLoad" draw:mime-type="image/png"/></draw:frame>Having model locally, I avoided the warning which I was seeing earlier.</text:p>
      <text:p text:style-name="P2"/>
      <text:p text:style-name="P2"><text:soft-page-break/></text:p>
      <text:p text:style-name="P3"/>
      <text:p text:style-name="P4">Sample embeddings:</text:p>
      <text:p text:style-name="P4"><draw:frame draw:style-name="fr2" draw:name="Image4" text:anchor-type="char" svg:width="17cm" svg:height="2.752cm" draw:z-index="3"><draw:image xlink:href="Pictures/1000000100000561000000DF757E82AC.png" xlink:type="simple" xlink:show="embed" xlink:actuate="onLoad" draw:mime-type="image/png"/></draw:frame></text:p>
      <text:p text:style-name="P3"/>
      <text:p text:style-name="P3"/>
      <text:p text:style-name="P5">It appears embedding time per chunk is very large than expected</text:p>
      <text:p text:style-name="P5"/>
      <text:p text:style-name="P5"><draw:frame draw:style-name="fr2" draw:name="Image5" text:anchor-type="char" svg:width="17cm" svg:height="8.334cm" draw:z-index="4"><draw:image xlink:href="Pictures/100000010000043D00000214F3DFDF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6">Benchmarked chunk size 32, 64, 128, 256 for embedding time</text:p>
      <text:p text:style-name="P6">PS C:\Users\shivp\project_rag\text_embedding_pipeline&gt; python main.py <text:s text:c="57"/></text:p>
      <text:p text:style-name="P6"/>
      <text:p text:style-name="P6">Loading model: models/bge-base-en-v1.5</text:p>
      <text:p text:style-name="P6">Loading weight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99/199 [00:00&lt;00:00, 7190.38it/s]</text:p>
      <text:p text:style-name="P6">Model loaded successfully.</text:p>
      <text:p text:style-name="P6"/>
      <text:p text:style-name="P6"/>
      <text:p text:style-name="P6">======================================================================</text:p>
      <text:p text:style-name="P6">Embedding Pipeline Benchmark</text:p>
      <text:p text:style-name="P6">======================================================================</text:p>
      <text:p text:style-name="P6">Batch Size : 64</text:p>
      <text:p text:style-name="P6"/>
      <text:p text:style-name="P6"><text:soft-page-break/>======================================================================</text:p>
      <text:p text:style-name="P6">Benchmarking Batch 1</text:p>
      <text:p text:style-name="P6">Chunks : 64</text:p>
      <text:p text:style-name="P6">Batch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/1 [00:27&lt;00:00, 27.18s/it]</text:p>
      <text:p text:style-name="P6"/>
      <text:p text:style-name="P6">Embedding Time : 27.18 sec</text:p>
      <text:p text:style-name="P6">Chunks/sec <text:s text:c="4"/>: 2.35</text:p>
      <text:p text:style-name="P6"/>
      <text:p text:style-name="P6">Benchmark complete.</text:p>
      <text:p text:style-name="P6">Stopping after first batch.</text:p>
      <text:p text:style-name="P6"/>
      <text:p text:style-name="P6">(venv) PS C:\Users\shivp\project_rag\text_embedding_pipeline&gt; python main.py</text:p>
      <text:p text:style-name="P6"/>
      <text:p text:style-name="P6">Loading model: models/bge-base-en-v1.5</text:p>
      <text:p text:style-name="P6">Loading weight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99/199 [00:00&lt;00:00, 7163.90it/s]</text:p>
      <text:p text:style-name="P6">Model loaded successfully.</text:p>
      <text:p text:style-name="P6"/>
      <text:p text:style-name="P6"/>
      <text:p text:style-name="P6">======================================================================</text:p>
      <text:p text:style-name="P6">Embedding Pipeline Benchmark</text:p>
      <text:p text:style-name="P6">======================================================================</text:p>
      <text:p text:style-name="P6">Batch Size : 128</text:p>
      <text:p text:style-name="P6"/>
      <text:p text:style-name="P6">======================================================================</text:p>
      <text:p text:style-name="P6">Benchmarking Batch 1</text:p>
      <text:p text:style-name="P6">Chunks : 128</text:p>
      <text:p text:style-name="P6">Batch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/1 [00:52&lt;00:00, 52.12s/it]</text:p>
      <text:p text:style-name="P6"/>
      <text:p text:style-name="P6">Embedding Time : 52.13 sec</text:p>
      <text:p text:style-name="P6">Chunks/sec <text:s text:c="4"/>: 2.46</text:p>
      <text:p text:style-name="P6"/>
      <text:p text:style-name="P6">Benchmark complete.</text:p>
      <text:p text:style-name="P6">Stopping after first batch.</text:p>
      <text:p text:style-name="P6"/>
      <text:p text:style-name="P6">(venv) PS C:\Users\shivp\project_rag\text_embedding_pipeline&gt; python main.py</text:p>
      <text:p text:style-name="P6"/>
      <text:p text:style-name="P6">Loading model: models/bge-base-en-v1.5</text:p>
      <text:p text:style-name="P6">Loading weight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99/199 [00:00&lt;00:00, 7029.24it/s]</text:p>
      <text:p text:style-name="P6">Model loaded successfully.</text:p>
      <text:p text:style-name="P6"/>
      <text:p text:style-name="P6"><text:soft-page-break/></text:p>
      <text:p text:style-name="P6">======================================================================</text:p>
      <text:p text:style-name="P6">Embedding Pipeline Benchmark</text:p>
      <text:p text:style-name="P6">======================================================================</text:p>
      <text:p text:style-name="P6">Batch Size : 256</text:p>
      <text:p text:style-name="P6"/>
      <text:p text:style-name="P6">======================================================================</text:p>
      <text:p text:style-name="P6">Benchmarking Batch 1</text:p>
      <text:p text:style-name="P6">Chunks : 256</text:p>
      <text:p text:style-name="P6">Batch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/1 [01:44&lt;00:00, 104.12s/it]</text:p>
      <text:p text:style-name="P6"/>
      <text:p text:style-name="P6">Embedding Time : 104.14 sec</text:p>
      <text:p text:style-name="P6">Chunks/sec <text:s text:c="4"/>: 2.46</text:p>
      <text:p text:style-name="P6"/>
      <text:p text:style-name="P6">Benchmark complete.</text:p>
      <text:p text:style-name="P6">Stopping after first batch.</text:p>
      <text:p text:style-name="P6"/>
      <text:p text:style-name="P6">(venv) PS C:\Users\shivp\project_rag\text_embedding_pipeline&gt; python main.py</text:p>
      <text:p text:style-name="P6"/>
      <text:p text:style-name="P6">Loading model: models/bge-base-en-v1.5</text:p>
      <text:p text:style-name="P6">Loading weight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99/199 [00:00&lt;00:00, 7505.18it/s]</text:p>
      <text:p text:style-name="P6">Model loaded successfully.</text:p>
      <text:p text:style-name="P6"/>
      <text:p text:style-name="P6"/>
      <text:p text:style-name="P6">======================================================================</text:p>
      <text:p text:style-name="P6">Embedding Pipeline Benchmark</text:p>
      <text:p text:style-name="P6">======================================================================</text:p>
      <text:p text:style-name="P6">Batch Size : 32</text:p>
      <text:p text:style-name="P6"/>
      <text:p text:style-name="P6">======================================================================</text:p>
      <text:p text:style-name="P6">Benchmarking Batch 1</text:p>
      <text:p text:style-name="P6">Chunks : 32</text:p>
      <text:p text:style-name="P6">Batch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/1 [00:11&lt;00:00, 11.66s/it]</text:p>
      <text:p text:style-name="P6"/>
      <text:p text:style-name="P6">Embedding Time : 11.67 sec</text:p>
      <text:p text:style-name="P6">Chunks/sec <text:s text:c="4"/>: 2.74</text:p>
      <text:p text:style-name="P6"/>
      <text:p text:style-name="P6">Benchmark complete.</text:p>
      <text:p text:style-name="P6">Stopping after first batch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We can also add following features as well:</text:p>
      <text:p text:style-name="P8"/>
      <text:list text:style-name="L1">
        <text:list-item>
          <text:p text:style-name="P9">Resume after interruption </text:p>
        </text:list-item>
        <text:list-item>
          <text:p text:style-name="P10">Logging framework </text:p>
        </text:list-item>
      </text:list>
      <text:list text:style-name="L2">
        <text:list-item>
          <text:p text:style-name="P11">Multi-processing </text:p>
        </text:list-item>
      </text:list>
      <text:list text:style-name="L3">
        <text:list-item>
          <text:p text:style-name="P12">Multi-GPU support </text:p>
        </text:list-item>
      </text:list>
      <text:list text:style-name="L4">
        <text:list-item>
          <text:p text:style-name="P13">Quantized embedding models </text:p>
        </text:list-item>
      </text:list>
      <text:list text:style-name="L5">
        <text:list-item>
          <text:p text:style-name="P14">Model versioning </text:p>
        </text:list-item>
      </text:list>
      <text:list text:style-name="L6">
        <text:list-item>
          <text:p text:style-name="P15">Storage abstraction </text:p>
        </text:list-item>
      </text:list>
      <text:list text:style-name="L7">
        <text:list-item>
          <text:p text:style-name="P16">Vector database integration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1T23:44:11.333344400</meta:creation-date>
    <dc:date>2026-07-12T02:16:11.082912000</dc:date>
    <meta:editing-duration>PT2H4M50S</meta:editing-duration>
    <meta:editing-cycles>8</meta:editing-cycles>
    <meta:generator>LibreOffice/25.8.7.3$Windows_X86_64 LibreOffice_project/30742500f2d3eb4366ac312fa33d3dcabdb3eba5</meta:generator>
    <meta:document-statistic meta:table-count="0" meta:image-count="5" meta:object-count="0" meta:page-count="5" meta:paragraph-count="80" meta:word-count="297" meta:character-count="4064" meta:non-whitespace-character-count="3774"/>
  </office:meta>
</office:document-meta>
</file>