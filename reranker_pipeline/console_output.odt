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9200000188B4AE381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7cm" svg:height="4.673cm" draw:z-index="0"><draw:image xlink:href="Pictures/100000010000059200000188B4AE381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8T23:44:46.089781300</meta:creation-date>
    <dc:date>2026-07-18T23:44:55.941634500</dc:date>
    <meta:editing-duration>PT1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8.7.3$Windows_X86_64 LibreOffice_project/30742500f2d3eb4366ac312fa33d3dcabdb3eba5</meta:generator>
  </office:meta>
</office:document-meta>
</file>