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D000000A7CB076B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6.531cm" svg:height="3.535cm" draw:z-index="0"><draw:image xlink:href="Pictures/100000010000030D000000A7CB076B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9T19:55:45.615651800</meta:creation-date>
    <dc:date>2026-07-19T19:56:03.27485290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7.3$Windows_X86_64 LibreOffice_project/30742500f2d3eb4366ac312fa33d3dcabdb3eba5</meta:generator>
  </office:meta>
</office:document-meta>
</file>